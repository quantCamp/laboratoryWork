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A00000078B23F2D421AED240B.png" manifest:media-type="image/png"/>
  <manifest:file-entry manifest:full-path="Pictures/100002010000025800000190955F25695BFFE702.png" manifest:media-type="image/png"/>
  <manifest:file-entry manifest:full-path="Pictures/100002010000025800000190A9469AAD0531E5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88de7" officeooo:paragraph-rsid="00188de7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Quotations">
      <style:text-properties officeooo:rsid="0012e246" officeooo:paragraph-rsid="0012e246"/>
    </style:style>
    <style:style style:name="P4" style:family="paragraph" style:parent-style-name="Text_20_body">
      <style:text-properties fo:language="ru" fo:country="RU" officeooo:rsid="0014d10d" officeooo:paragraph-rsid="0014d10d"/>
    </style:style>
    <style:style style:name="P5" style:family="paragraph" style:parent-style-name="Text_20_body">
      <style:text-properties fo:language="ru" fo:country="RU" officeooo:rsid="00164f97" officeooo:paragraph-rsid="00164f97"/>
    </style:style>
    <style:style style:name="P6" style:family="paragraph" style:parent-style-name="Text_20_body">
      <style:text-properties fo:language="ru" fo:country="RU" officeooo:rsid="00172b2c" officeooo:paragraph-rsid="00172b2c"/>
    </style:style>
    <style:style style:name="P7" style:family="paragraph" style:parent-style-name="Text_20_body">
      <style:text-properties fo:language="ru" fo:country="RU" officeooo:rsid="00188de7" officeooo:paragraph-rsid="00188de7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37bfa" officeooo:paragraph-rsid="00137bfa"/>
    </style:style>
    <style:style style:name="P10" style:family="paragraph" style:parent-style-name="Text_20_body">
      <style:text-properties officeooo:rsid="00188de7" officeooo:paragraph-rsid="00188de7"/>
    </style:style>
    <style:style style:name="P1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72b2c" officeooo:paragraph-rsid="00172b2c"/>
    </style:style>
    <style:style style:name="P13" style:family="paragraph" style:parent-style-name="Title">
      <style:text-properties officeooo:paragraph-rsid="0012e246"/>
    </style:style>
    <style:style style:name="P14" style:family="paragraph" style:parent-style-name="Heading_20_1">
      <style:text-properties officeooo:rsid="00137bfa" officeooo:paragraph-rsid="00137bfa"/>
    </style:style>
    <style:style style:name="P15" style:family="paragraph" style:parent-style-name="Heading_20_1">
      <style:text-properties officeooo:rsid="00172b2c" officeooo:paragraph-rsid="00172b2c"/>
    </style:style>
    <style:style style:name="P16" style:family="paragraph" style:parent-style-name="Heading_20_2">
      <style:text-properties officeooo:rsid="0014d10d" officeooo:paragraph-rsid="0014d10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officeooo:rsid="0012e2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Отчёт по лабораторной работе №1 </text:p>
      <text:p text:style-name="P2"><text:span text:style-name="T3">Выполненной </text:span>Чепкунов<text:span text:style-name="T3">ым</text:span> Рамил<text:span text:style-name="T3">ем</text:span> Аделевич<text:span text:style-name="T3">ем</text:span></text:p>
      <text:p text:style-name="P8"/>
      <text:p text:style-name="P3">Цель работы: Экспериментальное доказательство закона больших чисел.</text:p>
      <text:p text:style-name="P3">Оборудование: Ноутбук с <text:span text:style-name="T2">Python </text:span><text:span text:style-name="T1">3.11, библиотеки: </text:span><text:span text:style-name="T2">random – </text:span><text:span text:style-name="T1">для симуляции подбрасывания монетки</text:span><text:span text:style-name="T2">, mathplotlib – </text:span><text:span text:style-name="T1">для построения графиков</text:span><text:span text:style-name="T2">, time – </text:span><text:span text:style-name="T1">для измерения времени работы программы<text:line-break/></text:span></text:p>
      <text:h text:style-name="P14" text:outline-level="1">Теоретическая часть</text:h>
      <text:p text:style-name="P9">Закон больших чисел гласит, что при увеличении кол-ва испытаний, средний результат будет стремится к ожидаемому. Например, если вы подбросите идеальную монетку 10 раз, вам может не выпасть 5 орлов и 5 решек. Но если мы подкинем монетку 1 000 000 раз, то скорее всего, выпадет около 500 000 орлов и 500 000 решек.</text:p>
      <text:p text:style-name="P9">Для его проверки в рамках лабораторной работы, я написал программу на <text:span text:style-name="T2">Python, </text:span><text:span text:style-name="T1">которая симулирует подбрасывания монетки, она находится в файле </text:span><text:span text:style-name="T2">main.py</text:span></text:p>
      <text:h text:style-name="P16" text:outline-level="2">Программа <text:span text:style-name="T2">main.py</text:span></text:h>
      <text:p text:style-name="P4">Функция <text:span text:style-name="T2">flip_coin(n</text:span>) симулирует<text:span text:style-name="T2"> n-</text:span>кратное<text:span text:style-name="T2"> </text:span>подбрасывание монетки и возвращает кол-во выпавших орлов</text:p>
      <text:p text:style-name="P4">Функция <text:span text:style-name="T2">run_single_experiment</text:span>(<text:span text:style-name="T2">n)</text:span> вызывает функцию<text:span text:style-name="T2"> flip_coin(n),</text:span> параллельно засекая время работы, считая частоту выпадения орлов и отклонение от ожидания.</text:p>
      <text:p text:style-name="P4">Функция <text:span text:style-name="T2">run_series(n, num_run=5) </text:span>проводит серию из <text:span text:style-name="T2">num_run </text:span>экспериментов (по умолчанию из 5) и выводит в консоль всю необходимую информацию, а именно: частоту выпадения орлов в каждом эксперименте, среднюю частоту выпадения орлов, среднее отклонение от ожидания, среднее время выполнения, минимальное время выполнения и максимальное время выполнения</text:p>
      <text:p text:style-name="P5">Исходный код:</text:p>
      <text:p text:style-name="P11">import random</text:p>
      <text:p text:style-name="P11">import time</text:p>
      <text:p text:style-name="P11">def run_single_experiment(n):</text:p>
      <text:p text:style-name="P11"><text:s text:c="4"/>start_time = time.perf_counter()</text:p>
      <text:p text:style-name="P11"><text:s text:c="4"/>heads = flip_coin(n)</text:p>
      <text:p text:style-name="P11"><text:s text:c="4"/>end_time = time.perf_counter()</text:p>
      <text:p text:style-name="P11"><text:soft-page-break/><text:s text:c="4"/>elapsed_time = end_time - start_time</text:p>
      <text:p text:style-name="P11"><text:s text:c="4"/>frequency = heads / n</text:p>
      <text:p text:style-name="P11"><text:s text:c="4"/>deviation = abs(frequency - 0.5)</text:p>
      <text:p text:style-name="P11"><text:s text:c="4"/>return frequency, deviation, elapsed_time</text:p>
      <text:p text:style-name="P11"/>
      <text:p text:style-name="P11"/>
      <text:p text:style-name="P11">def flip_coin(n):</text:p>
      <text:p text:style-name="P11"><text:s text:c="4"/>heads_count = 0</text:p>
      <text:p text:style-name="P11"><text:s text:c="4"/>for i in range(n):</text:p>
      <text:p text:style-name="P11"><text:s text:c="8"/>heads_count += random.randint(0, 1)</text:p>
      <text:p text:style-name="P11"><text:s text:c="4"/>return heads_count</text:p>
      <text:p text:style-name="P11"/>
      <text:p text:style-name="P11"/>
      <text:p text:style-name="P11">def run_series(n, num_runs=5):</text:p>
      <text:p text:style-name="P11"><text:s text:c="4"/>frequencies = []</text:p>
      <text:p text:style-name="P11"><text:s text:c="4"/>deviations = []</text:p>
      <text:p text:style-name="P11"><text:s text:c="4"/>elapsed_times = []</text:p>
      <text:p text:style-name="P11"><text:s text:c="4"/>max_time = 0</text:p>
      <text:p text:style-name="P11"><text:s text:c="4"/>min_time = 1000</text:p>
      <text:p text:style-name="P11"><text:s text:c="4"/>print(f"Запуск проверки для {n} бросков")</text:p>
      <text:p text:style-name="P11"><text:s text:c="4"/>print(" Частоты выпадения орлов: ", end="")</text:p>
      <text:p text:style-name="P11"><text:s text:c="4"/>for i in range(num_runs):</text:p>
      <text:p text:style-name="P11"><text:s text:c="8"/>frequency, deviation, elapsed_time = run_single_experiment(n)</text:p>
      <text:p text:style-name="P11"><text:s text:c="8"/>frequencies.append(frequency)</text:p>
      <text:p text:style-name="P11"><text:s text:c="8"/>deviations.append(deviation)</text:p>
      <text:p text:style-name="P11"><text:s text:c="8"/>elapsed_times.append(elapsed_time)</text:p>
      <text:p text:style-name="P11"><text:s text:c="8"/>max_time = max(max_time, elapsed_time)</text:p>
      <text:p text:style-name="P11"><text:s text:c="8"/>min_time = min(min_time, elapsed_time)</text:p>
      <text:p text:style-name="P11"><text:s text:c="8"/>print(frequency, end=", ")</text:p>
      <text:p text:style-name="P11"><text:s text:c="4"/>middle_frequencies = sum(frequencies) / len(frequencies)</text:p>
      <text:p text:style-name="P11"><text:s text:c="4"/>middle_deviations = sum(deviations) / len(deviations)</text:p>
      <text:p text:style-name="P11"><text:s text:c="4"/>middle_elapsed_times = sum(elapsed_times) / len(elapsed_times)</text:p>
      <text:p text:style-name="P11"><text:s text:c="4"/>print(f""" <text:s/>Средняя частота: {middle_frequencies} | Среднее отклонение: {middle_deviations}</text:p>
      <text:p text:style-name="P11"><text:s text:c="2"/>Время выполнения: среднее = {middle_elapsed_times} сек | мин = {min_time} сек | макс = {max_time} сек""")</text:p>
      <text:p text:style-name="P11"><text:s text:c="4"/>print()</text:p>
      <text:p text:style-name="P11"/>
      <text:p text:style-name="P12"/>
      <text:p text:style-name="P11">for i in range(1, 6):</text:p>
      <text:p text:style-name="P11"><text:s text:c="4"/>run_series(10 ** i)</text:p>
      <text:p text:style-name="P11"/>
      <text:p text:style-name="P11">print("Эксперимент завершён!")</text:p>
      <text:h text:style-name="P15" text:outline-level="1"><text:soft-page-break/>Результаты работы</text:h>
      <text:p text:style-name="P6">Ниже приведена таблица с значениями, полученными при выполнении программы <text:span text:style-name="T2">main.py:</text:span></text:p>
      <text:p text:style-name="P7"><draw:frame draw:style-name="fr4" draw:name="Изображение1" text:anchor-type="char" svg:width="17cm" svg:height="2.004cm" draw:z-index="0"><draw:image xlink:href="Pictures/10000201000003FA00000078B23F2D421AED240B.png" xlink:type="simple" xlink:show="embed" xlink:actuate="onLoad" draw:mime-type="image/png"/></draw:frame>для более удобного представления я сделал графики:</text:p>
      <text:p text:style-name="P10"><draw:frame draw:style-name="fr3" draw:name="Изображение3" text:anchor-type="char" svg:width="15.24cm" svg:height="10.16cm" draw:z-index="2"><draw:image xlink:href="Pictures/100002010000025800000190955F25695BFFE702.png" xlink:type="simple" xlink:show="embed" xlink:actuate="onLoad" draw:mime-type="image/png"/></draw:frame><draw:frame draw:style-name="fr2" draw:name="Изображение2" text:anchor-type="char" svg:width="15.24cm" svg:height="10.16cm" draw:z-index="1"><draw:image xlink:href="Pictures/100002010000025800000190A9469AAD0531E52C.png" xlink:type="simple" xlink:show="embed" xlink:actuate="onLoad" draw:mime-type="image/png"/></draw:frame><draw:frame draw:style-name="fr1" draw:name="Изображение4" text:anchor-type="char" svg:x="0.642cm" svg:y="10.396cm" svg:width="15.24cm" svg:height="10.16cm" draw:z-index="3"><draw:image xlink:href="Pictures/100002010000025800000190A9469AAD0531E5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8de7" officeooo:paragraph-rsid="00188d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6T11:25:40.621000000</meta:creation-date>
    <dc:date>2026-07-07T10:18:09.887000000</dc:date>
    <meta:editing-duration>PT11M32S</meta:editing-duration>
    <meta:editing-cycles>3</meta:editing-cycles>
    <meta:generator>LibreOffice/7.1.5.2$Windows_X86_64 LibreOffice_project/85f04e9f809797b8199d13c421bd8a2b025d52b5</meta:generator>
    <meta:document-statistic meta:table-count="0" meta:image-count="4" meta:object-count="0" meta:page-count="3" meta:paragraph-count="55" meta:word-count="360" meta:character-count="3023" meta:non-whitespace-character-count="2550"/>
  </office:meta>
</office:document-meta>
</file>